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T4" style:parent-style-name="Fonteparág.padrão" style:family="text">
      <style:text-properties fo:font-style="italic" style:font-style-asian="italic" style:font-style-complex="italic"/>
    </style:style>
    <style:style style:name="P5" style:parent-style-name="Normal" style:family="paragraph">
      <style:paragraph-properties fo:text-indent="0.4916in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P7" style:parent-style-name="Normal" style:family="paragraph">
      <style:paragraph-properties fo:break-before="page"/>
      <style:text-properties fo:hyphenate="true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break-before="page"/>
      <style:text-properties fo:hyphenate="true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Título1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fo:font-style="italic" style:font-style-asian="italic" style:font-style-complex="italic"/>
    </style:style>
    <style:style style:name="T16" style:parent-style-name="Fonteparág.padrão" style:family="text">
      <style:text-properties fo:font-style="italic" style:font-style-asian="italic" style:font-style-complex="italic"/>
    </style:style>
    <style:style style:name="P17" style:parent-style-name="Normal" style:family="paragraph">
      <style:paragraph-properties fo:keep-with-next="always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fo:font-style="italic" style:font-style-asian="italic" style:font-style-complex="italic"/>
    </style:style>
    <style:style style:name="T24" style:parent-style-name="Fonteparág.padrão" style:family="text">
      <style:text-properties fo:font-style="italic" style:font-style-asian="italic" style:font-style-complex="italic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keep-with-next="always"/>
    </style:style>
    <style:style style:name="P33" style:parent-style-name="Normal" style:family="paragraph">
      <style:paragraph-properties fo:break-before="page"/>
      <style:text-properties fo:hyphenate="true"/>
    </style:style>
    <style:style style:name="T34" style:parent-style-name="Fonteparág.padrão" style:family="text">
      <style:text-properties fo:font-style="italic" style:font-style-asian="italic" style:font-style-complex="italic"/>
    </style:style>
    <style:style style:name="T35" style:parent-style-name="Fonteparág.padrão" style:family="text">
      <style:text-properties fo:font-style="italic" style:font-style-asian="italic" style:font-style-complex="italic"/>
    </style:style>
    <style:style style:name="P36" style:parent-style-name="Normal" style:family="paragraph">
      <style:paragraph-properties fo:keep-with-next="always"/>
    </style:style>
    <style:style style:name="T37" style:parent-style-name="Fonteparág.padrão" style:family="text">
      <style:text-properties fo:font-style="italic" style:font-style-asian="italic" style:font-style-complex="italic"/>
    </style:style>
    <style:style style:name="P38" style:parent-style-name="Normal" style:family="paragraph">
      <style:paragraph-properties fo:keep-with-next="always"/>
    </style:style>
    <style:style style:name="P39" style:parent-style-name="Normal" style:family="paragraph">
      <style:paragraph-properties fo:keep-with-next="always"/>
    </style:style>
    <style:style style:name="T40" style:parent-style-name="Fonteparág.padrão" style:family="text">
      <style:text-properties fo:font-style="italic" style:font-style-asian="italic" style:font-style-complex="italic"/>
    </style:style>
    <style:style style:name="P41" style:parent-style-name="Normal" style:family="paragraph">
      <style:paragraph-properties>
        <style:tab-stops>
          <style:tab-stop style:type="left" style:position="1.9923in"/>
        </style:tab-stops>
      </style:paragraph-properties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ntrodução</text:h>
      <text:p text:style-name="Normal"/>
      <text:p text:style-name="Normal"><text:tab/>No mundo atual, as principais infraestruturas de um país utilizam de alguma maneira computadores para o seu funcionamento. Sendo vital para o seu funcionamento, a segurança digital destas infraestruturas é vital para a segurança nacional, e como consequência um alvo prioritário de eventuais atacantes. Com o objetivo de estudar e analisar a importância do<text:s/><text:span text:style-name="T3">“wargaming”<text:s/></text:span>no campo da cibersegurança, este relatório visa abordar o tema através da<text:s/><text:span text:style-name="T4">framework</text:span><text:s/>Unified Kill Chain e apresentar uma nova ferramenta da analise e preparação de ataques cibernéticos.</text:p>
      <text:p text:style-name="Normal"><text:tab/>A ferramenta chamada de BeatRoot é a nossa proposta para planear e armazenar informações coletadas durante as fases iniciais do Unified Kill Chain, nela é possível criar um mapa do sistema alvo e transferir essas informações coletadas para outros atacantes, de modo a facilitar todo o processo de ataque.</text:p>
      <text:p text:style-name="Normal"><text:tab/>Também utilizável para a visualização e analise de seus próprios sistemas, o BeatRoot é uma ferramenta que auxilia administradores de sistemas a protegerem contra ameaças e ciberataques.</text:p>
      <text:p text:style-name="P5">Para além da ferramenta, também nos foi pedido assumir o papel de um grupo de hackers e desenvolver um<text:s/><text:span text:style-name="T6">mindset</text:span><text:s/>que irá guiar a equipa dentro do contexto de wargaming, levando em consideração a forma da equipa operar, sua motivação e modo de agir. Por isso, esse relatório inicia-se com o modo como pensamos e abordamos o wargaming a nível estratégico e operacional.</text:p>
      <text:p text:style-name="Normal"/>
      <text:p text:style-name="Normal"/>
      <text:p text:style-name="P7"/>
      <text:h text:style-name="Título1" text:outline-level="1">Escolha de alvos e motivação dos ataques</text:h>
      <text:p text:style-name="Normal"/>
      <text:p text:style-name="Normal"><text:tab/>A escolha do alvo é parte fundamental para o início de um ciberataque, sem um adversário não há ataque, e a definição clara e objetiva de quem é o adversário é o início de qualquer operação de ciberataque. A motivação da escolha, seja ela política, ideológica, militar ou financeira deve levar em conta a existência de um sistema, serviço, infraestrutura ou pessoa concretos.<text:s/></text:p>
      <text:p text:style-name="Normal">Motivações generalistas como lutar contra a corrupção, vencer a guerra ou derrubar determinado regime devem levar em consideração que estrutura real levarão a estes objetivos. Isso significa entender o funcionamento das infraestruturas principais do adversário e escolher um alvo que realmente cause impacto no objetivo final, tomar controle e desabilitar todo o qualquer serviço do adversário não significa causar um impacto real e ainda pode alerta-lo em relação a suas intenções.</text:p>
      <text:p text:style-name="Normal"><text:tab/>Uma vez selecionado um alvo em que cause dano significativo no adversário, toda a motivação ideológica e motivo do ataque não devem interferir no modo de agir da equipa técnica responsável pela missão. O momento de discussão sobre atacar ou não já passou, agora a equipa técnica irá se preocupar única e exclusivamente no<text:s/><text:span text:style-name="T8">como<text:s/></text:span>o ataque será realizado da maneira mais eficiente possível, usando todos os meios necessários para alcançar os objetivos.</text:p>
      <text:p text:style-name="P9"/>
      <text:h text:style-name="Título1" text:outline-level="1">Operar em equipa</text:h>
      <text:p text:style-name="Normal"/>
      <text:p text:style-name="Normal"><text:tab/>É muito comum na comunidade hacker a busca por reconhecimento. Muitos hackers realizam ataques pura e simplesmente pelo desafio e para alcançar a fama dentro da comunidade, o que pode levar ao individualismo e a competitividade. Este comportamento é prejudicial para o cumprimento mais eficaz do objetivo, pois a divisão de tarefas em equipa acelera o tempo de cumprimento dos objetivos e em um contexto de guerra cibernética o tempo é fator determinante para a vitória. Por isso o compartilhamento das informações com a equipa de ataque é fundamental para um ataque bem sucedido.</text:p>
      <text:p text:style-name="P10"/>
      <text:p text:style-name="Normal"/>
      <text:h text:style-name="P11" text:outline-level="1">The Unified kill chain<text:s/>e<text:s/>Find&amp;Share</text:h>
      <text:p text:style-name="P12"/>
      <text:p text:style-name="Normal"><text:span text:style-name="T13"><text:tab/></text:span>A escolha da Unified kill chain como framework que iremos utilizar como base para nossos ataques se dá devido a sua plasticidade para diversos tipos de ataques diferentes. Para além do que está estabelecido dentro desta framework, nossa proposta é estabelecer dentro das fases de ataque inicias,<text:s/><text:span text:style-name="T14">Reconnaissance</text:span><text:s/>e<text:s/><text:span text:style-name="T15">Resource Development</text:span>, um componente de compartilhamento de informações em equipa que acelere este processo e facilite a procura por vulnerabilidades. Uma espécie de framework dentro da framework. Nós a chamamos de<text:s/><text:span text:style-name="T16">Find&amp;Share</text:span>:</text:p>
      <text:p text:style-name="Normal"/>
      <text:p text:style-name="P17"><draw:frame draw:style-name="a1" draw:name="Imagem 2" text:anchor-type="as-char" svg:x="0in" svg:y="0in" svg:width="4.03465in" svg:height="3.74837in" style:rel-width="scale" style:rel-height="scale"><draw:image xlink:href="media/image2.jpeg" xlink:type="simple" xlink:show="embed" xlink:actuate="onLoad"/><svg:title/><svg:desc/></draw:frame></text:p>
      <text:p text:style-name="Legenda">Figura<text:s/>1<text:s/>Find&amp;Share</text:p>
      <text:p text:style-name="Normal"><text:span text:style-name="T18">Search:<text:s/></text:span>A procura por vulnerabilidades, cada membro da equipa deve estar responsável por uma busca.</text:p>
      <text:p text:style-name="Normal"><text:span text:style-name="T19">Find:<text:s/></text:span>Ao encontrar algo deve ser levado em consideração se é relevante ou não para o ataque.</text:p>
      <text:p text:style-name="Normal"><text:span text:style-name="T20">Mapping:<text:s/></text:span>A informação encontrada deve ser inserida dentro do mapa do sistema adversário de modo coerente ao sistema.</text:p>
      <text:p text:style-name="Normal"><text:span text:style-name="T21">Share:<text:s/></text:span>O mapa deve ser compartilhado e atualizado a cada nova descoberta relevante.</text:p>
      <text:soft-page-break/>
      <text:h text:style-name="Título1" text:outline-level="1">Exemplo de uso do Find&amp;Share</text:h>
      <text:p text:style-name="Normal"/>
      <text:p text:style-name="Normal"><text:tab/>Durante a preparação de um ataque, diversas<text:s/>buscas no sistema adversário são realizadas que coletam informações necessárias para a realização de ataques. Essas informações partilhadas entre os membros da equipa de ataque aceleram a fase de busca e tornam o ataque mais eficiente. Abaixo um exemplo de uso do Find&amp;Share em um ataque a um servidor:</text:p>
      <text:p text:style-name="Normal"><text:span text:style-name="T22">Search:<text:s/></text:span>Um dos atacantes realiza uma busca no servidor e procura por portas abertas utilizando a ferramenta<text:s/><text:span text:style-name="T23">Nmap</text:span><text:span text:style-name="T24">.<text:s/></text:span>Para evitar ser detetado, ele evita fazer ruído na rede e essa busca é mais lenta, levando horas para ser realizada.</text:p>
      <text:p text:style-name="Normal">O segundo atacante foca em uma busca<text:s/>dentro do serviço Smb que corre no servidor alvo. Com a ferramenta SMBmap, ele procura pastas escondidas na rede com permissões mal formatadas de escrita e leitura.<text:s/></text:p>
      <text:p text:style-name="Normal"><text:span text:style-name="T25">Find</text:span><text:span text:style-name="T26">:</text:span><text:s/>Os atacantes encontram diversas informações e selecionam as mais relevantes para o ataque. No nosso exemplo, ao correr o nmap o primeiro atacante percebe que 44815 corre um site de wordpress interno para testes sem criptografia.</text:p>
      <text:p text:style-name="Normal">O segundo atacante percebe que há uma pasta compartilhada oculta dentro do serviço smb em que é permitido escrita para usuários guest.</text:p>
      <text:p text:style-name="Normal"><text:span text:style-name="T27">Mapping:</text:span><text:s/>Os dois atacantes então criam um mapa do servidor com as vulnerabilidades encontradas, reportando as portas abertas relevantes e as pastas compartilhadas vulneráveis, criando um desenho de como o servidor opera.</text:p>
      <text:p text:style-name="Normal"><text:span text:style-name="T28">Share</text:span><text:span text:style-name="T29">:<text:s/></text:span>Essa informação é compartilhada entre os atacantes, que decidem o modo como devem prosseguir. Novos objetivos de<text:s/><text:span text:style-name="T30">S</text:span><text:span text:style-name="T31">earch</text:span><text:s/>são estabelecidos levando em conta as novas informações, e o ciclo se repete até o ataque ser de fato realizado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BeatRooter<text:s/>como solução</text:h>
      <text:p text:style-name="Normal"/>
      <text:p text:style-name="Normal"><text:tab/>Com o objetivo de facilitar o processo Find&amp;Share desenvolvemos uma ferramenta de mapeamento de vulnerabilidades, o BeatRooter. No BeatRooter é possível criar um mapa de ciberataque completo, incluindo todas as informações relevantes do ataque e criar<text:s/>um ficheiro fácil de compartilhar entre<text:s/>a equipa. O BeatRooter conta com uma série de ferramentas de reconhecimento que facilitam o processo de search e agiliza o processo de coleta de informações.</text:p>
      <text:p text:style-name="Normal">Vejamos um exemplo de seu funcionamento em um ataque:</text:p>
      <text:p text:style-name="Normal"/>
      <text:p text:style-name="P32"><draw:frame draw:style-name="a2" draw:name="Imagem 3" text:anchor-type="as-char" svg:x="0in" svg:y="0in" svg:width="5.90556in" svg:height="3.23333in" style:rel-width="scale" style:rel-height="scale"><draw:image xlink:href="media/image3.jpeg" xlink:type="simple" xlink:show="embed" xlink:actuate="onLoad"/><svg:title/><svg:desc/></draw:frame></text:p>
      <text:p text:style-name="Legenda">Figura<text:s/>2<text:s/>Exemplo de um mapa de ataque no BeatRooter</text:p>
      <text:p text:style-name="Normal"><text:s/></text:p>
      <text:p text:style-name="P33"/>
      <text:soft-page-break/>
      <text:p text:style-name="Normal">Neste <text:s/>exemplo, foi encontrado uma vulnerabilidade de uma conta de administrador em que a palavra-passe foi descoberta através de<text:s/><text:span text:style-name="T34">brute force</text:span><text:span text:style-name="T35">.</text:span></text:p>
      <text:p text:style-name="P36"><draw:frame draw:style-name="a3" draw:name="Imagem 5" text:anchor-type="as-char" svg:x="0in" svg:y="0in" svg:width="4.15833in" svg:height="2.14167in" style:rel-width="scale" style:rel-height="scale"><draw:image xlink:href="media/image4.png" xlink:type="simple" xlink:show="embed" xlink:actuate="onLoad"/><svg:title/><svg:desc/></draw:frame></text:p>
      <text:p text:style-name="Legenda">Figura<text:s/>3<text:s/>Usuário e senha descobertos e documentados.</text:p>
      <text:p text:style-name="Normal"/>
      <text:p text:style-name="Normal">Abaixo, o uso do privilégio de administrador permite o<text:s/><text:span text:style-name="T37">Comand and control</text:span><text:s/>do server através da porta<text:s/>5986<text:s/>no serviço<text:s/>wsman:</text:p>
      <text:p text:style-name="P38"><draw:frame draw:style-name="a4" draw:name="Imagem 7" text:anchor-type="as-char" svg:x="0in" svg:y="0in" svg:width="5.16156in" svg:height="1.65349in" style:rel-width="scale" style:rel-height="scale"><draw:image xlink:href="media/image5.png" xlink:type="simple" xlink:show="embed" xlink:actuate="onLoad"/><svg:title/><svg:desc/></draw:frame></text:p>
      <text:p text:style-name="Legenda">Figura<text:s/>4<text:s/>Em vermelho o servidor alvo e seu IP, em amarelo a porta e o serviço encontrado.</text:p>
      <text:p text:style-name="Normal"/>
      <text:p text:style-name="Normal">A entrega do ataque através do serviço<text:s/>é demonstrada nesses nodes:</text:p>
      <text:p text:style-name="P39"><draw:frame draw:style-name="a5" draw:name="Imagem 8" text:anchor-type="as-char" svg:x="0in" svg:y="0in" svg:width="5.36668in" svg:height="1.20069in" style:rel-width="scale" style:rel-height="scale"><draw:image xlink:href="media/image6.png" xlink:type="simple" xlink:show="embed" xlink:actuate="onLoad"/><svg:title/><svg:desc/></draw:frame></text:p>
      <text:p text:style-name="Legenda">Figura<text:s/>5<text:s/>Nota de como foi executado o ataque e resultado.</text:p>
      <text:p text:style-name="Normal"/>
      <text:p text:style-name="Normal">Neste exemplo simples, a informação de como executar um<text:s/><text:span text:style-name="T40">Command and Control</text:span><text:s/>no servidor é facilmente explicada neste diagrama e pode ser<text:s/><text:soft-page-break/>compartilhada com outros membros da equipa para enfim a execução dos objetivos do ataqu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Legenda" style:display-name="Legenda" style:family="paragraph" style:parent-style-name="Normal" style:next-style-name="Normal">
      <style:paragraph-properties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onteparág.padrão" style:family="text">
      <style:text-properties fo:font-weight="bold" style:font-weight-asian="bold" style:font-weight-complex="bold" fo:color="#1F497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Picture 2" text:anchor-type="paragraph" svg:x="-0.60185in" svg:y="-0.76852in" svg:width="2.60391in" svg:height="0.65741in" style:rel-width="scale" style:rel-height="scale"><draw:image xlink:href="media/image1.emf" xlink:type="simple" xlink:show="embed" xlink:actuate="onLoad"/><svg:title/><svg:desc/></draw:frame></text:p>
      </style:header>
      <style:footer>
        <text:p text:style-name="Rodapé"><text:s/><text:span text:style-name="T2">|||</text:span><text:s/>ISTEC do Porto - Instituto Superior de Tecnologias Avançadas do Port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odrigo baltazar</meta:initial-creator>
    <dc:creator>rodrigo baltazar</dc:creator>
    <meta:creation-date>2025-12-01T20:36:00Z</meta:creation-date>
    <dc:date>2025-12-02T12:02:00Z</dc:date>
    <meta:template xlink:href="Modelo%20ISTEC.dotx" xlink:type="simple"/>
    <meta:editing-cycles>7</meta:editing-cycles>
    <meta:editing-duration>PT8880S</meta:editing-duration>
    <meta:document-statistic meta:page-count="8" meta:paragraph-count="15" meta:word-count="1175" meta:character-count="7510" meta:row-count="52" meta:non-whitespace-character-count="6350"/>
  </office:meta>
</office:document-meta>
</file>